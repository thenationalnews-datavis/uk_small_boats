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2778in" svg:y="0.07569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5T00:00:00" table:style-name="ce27">
            <text:p>05/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6T00:00:00" table:style-name="ce27">
            <text:p>0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8T00:00:00" table:style-name="ce27">
            <text:p>08/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9T00:00:00" table:style-name="ce27">
            <text:p>0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0T00:00:00" table:style-name="ce27">
            <text:p>10/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1T00:00:00" table:style-name="ce27">
            <text:p>1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491"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number-rows-repeated="1048135"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
    <dc:description/>
    <dc:subject/>
    <meta:initial-creator/>
    <dc:creator/>
    <meta:creation-date>2026-06-12T14:35:24Z</meta:creation-date>
    <dc:date>2026-06-12T14:35:31Z</dc:date>
  </office:meta>
</office:document-meta>
</file>