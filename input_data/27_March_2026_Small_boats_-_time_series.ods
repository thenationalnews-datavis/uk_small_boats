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fo:background-color="#FFFFFF"/>
      <style:text-properties fo:color="#000000"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5626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6</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31">
            <text:p>10. Due to the Easter weekend, the next weekly publication will be delayed from Friday 3rd to Tuesday 7th April.</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568"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5">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5">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5">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style-name="ro15">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16" table:style-name="ce11">
            <text:p>216</text:p>
          </table:table-cell>
          <table:table-cell office:value-type="float" office:value="12" table:style-name="ce11">
            <text:p>12</text:p>
          </table:table-cell>
          <table:table-cell table:number-columns-repeated="16378"/>
        </table:table-row>
        <table:table-row table:style-name="ro15">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table:number-columns-repeated="16378"/>
        </table:table-row>
        <table:table-row table:style-name="ro15">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199" table:style-name="ce11">
            <text:p>199</text:p>
          </table:table-cell>
          <table:table-cell office:value-type="float" office:value="13" table:style-name="ce11">
            <text:p>13</text:p>
          </table:table-cell>
          <table:table-cell table:number-columns-repeated="16378"/>
        </table:table-row>
        <table:table-row table:number-rows-repeated="1048146" table:style-name="ro15">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title/>
    <dc:description/>
    <dc:subject/>
    <meta:initial-creator/>
    <dc:creator/>
    <meta:creation-date>2026-03-27T15:59:17Z</meta:creation-date>
    <dc:date>2026-03-27T15:59:33Z</dc:date>
  </office:meta>
</office:document-meta>
</file>